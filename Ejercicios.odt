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6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7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8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9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10" style:family="paragraph" style:parent-style-name="Text_20_body" style:list-style-name="L9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Variables y tipos</text:p>
        </text:list-item>
      </text:list>
      <text:p text:style-name="P2">Declara una variable nombre y asígnale tu nombre. Declara una variable edad y asígnale un número. Muestra en consola: "Hola, me llamo X y tengo Y años". </text:p>
      <text:list text:style-name="L2">
        <text:list-item>
          <text:p text:style-name="P3">Operaciones matemáticas</text:p>
        </text:list-item>
      </text:list>
      <text:p text:style-name="P2">Pide dos números (puedes asignarlos directamente). Muestra su suma, resta, multiplicación y división. </text:p>
      <text:list text:style-name="L3">
        <text:list-item>
          <text:p text:style-name="P4">Condicionales</text:p>
        </text:list-item>
      </text:list>
      <text:p text:style-name="P2">Crea una variable numero. Si es mayor que 0, muestra "Positivo". Si es menor que 0, "Negativo". Si es 0, "Cero". </text:p>
      <text:list text:style-name="L4">
        <text:list-item>
          <text:p text:style-name="P5">Bucles</text:p>
        </text:list-item>
      </text:list>
      <text:p text:style-name="P2">Imprime los números del 1 al 10 usando un for. Imprime los números pares del 1 al 20. </text:p>
      <text:list text:style-name="L5">
        <text:list-item>
          <text:p text:style-name="P6">Arrays</text:p>
        </text:list-item>
      </text:list>
      <text:p text:style-name="P2">Crea un array con 5 frutas. Muestra la primera y la última. Recorre el array e imprime cada elemento. </text:p>
      <text:list text:style-name="L6">
        <text:list-item>
          <text:p text:style-name="P7">Funciones</text:p>
        </text:list-item>
      </text:list>
      <text:p text:style-name="P2">Crea una función saludar(nombre) que devuelva "Hola, nombre". Crea una función que reciba dos números y devuelva el mayor. </text:p>
      <text:list text:style-name="L7">
        <text:list-item>
          <text:p text:style-name="P8">Objetos</text:p>
        </text:list-item>
      </text:list>
      <text:p text:style-name="P2">Crea un objeto persona con propiedades: nombre, edad, ciudad. Muestra una frase usando esos datos. </text:p>
      <text:list text:style-name="L8">
        <text:list-item>
          <text:p text:style-name="P9">Métodos de arrays</text:p>
        </text:list-item>
      </text:list>
      <text:p text:style-name="P2">Dado un array de números [1,2,3,4,5]: Usa map para duplicarlos. Usa filter para quedarte con los mayores a 3. </text:p>
      <text:list text:style-name="L9">
        <text:list-item>
          <text:p text:style-name="P10">Strings</text:p>
        </text:list-item>
      </text:list>
      <text:p text:style-name="P11"><text:span text:style-name="T1">Dado un string "javascript": Muéstralo en mayúsculas. Cuenta cuántas letras tiene. Invierte el string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0:39:04.998726700</meta:creation-date>
    <dc:date>2026-05-06T18:28:17.632884800</dc:date>
    <meta:editing-duration>PT4H34M35S</meta:editing-duration>
    <meta:editing-cycles>1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8" meta:word-count="188" meta:character-count="1114" meta:non-whitespace-character-count="944"/>
  </office:meta>
</office:document-meta>
</file>